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1.467cm" fo:min-width="2.508cm" loext:decorative="false"/>
      <style:paragraph-properties style:writing-mode="lr-tb"/>
    </style:style>
    <style:style style:name="gr2" style:family="graphic" style:parent-style-name="standard">
      <style:graphic-properties draw:textarea-vertical-align="middle" draw:auto-grow-height="false" fo:min-height="1.445cm" fo:min-width="3.328cm" loext:decorative="false"/>
      <style:paragraph-properties style:writing-mode="lr-tb"/>
    </style:style>
    <style:style style:name="gr3" style:family="graphic" style:parent-style-name="standard">
      <style:graphic-properties draw:fill="solid" draw:fill-color="#fff5ce" draw:textarea-vertical-align="middle" draw:auto-grow-height="false" fo:min-height="2.273cm" fo:min-width="2.994cm" loext:decorative="false"/>
      <style:paragraph-properties style:writing-mode="lr-tb"/>
    </style:style>
    <style:style style:name="gr4" style:family="graphic" style:parent-style-name="standard">
      <style:graphic-properties draw:fill="solid" draw:fill-color="#dedce6" draw:textarea-vertical-align="top" draw:auto-grow-height="false" fo:min-height="8.223cm" fo:min-width="4.968cm" loext:decorative="false"/>
      <style:paragraph-properties style:writing-mode="lr-tb"/>
    </style:style>
    <style:style style:name="gr5" style:family="graphic" style:parent-style-name="standard">
      <style:graphic-properties draw:textarea-vertical-align="middle" draw:auto-grow-height="false" fo:min-height="1.445cm" fo:min-width="2.507cm" loext:decorative="false"/>
      <style:paragraph-properties style:writing-mode="lr-tb"/>
    </style:style>
    <style:style style:name="gr6" style:family="graphic" style:parent-style-name="standard">
      <style:graphic-properties draw:textarea-vertical-align="top" draw:auto-grow-height="false" fo:min-height="2.715cm" fo:min-width="3.602cm" loext:decorative="false"/>
      <style:paragraph-properties style:writing-mode="lr-tb"/>
    </style:style>
    <style:style style:name="gr7" style:family="graphic" style:parent-style-name="standard">
      <style:graphic-properties draw:fill="solid" draw:fill-color="#fff5ce" draw:textarea-vertical-align="top" draw:auto-grow-height="false" fo:min-height="0.872cm" fo:min-width="2.994cm" loext:decorative="false"/>
      <style:paragraph-properties style:writing-mode="lr-tb"/>
    </style:style>
    <style:style style:name="gr8" style:family="graphic" style:parent-style-name="standard">
      <style:graphic-properties draw:fill="solid" draw:fill-color="#dedce6" draw:textarea-vertical-align="top" draw:auto-grow-height="false" fo:min-height="15.635cm" fo:min-width="10.983cm" loext:decorative="false"/>
      <style:paragraph-properties style:writing-mode="lr-tb"/>
    </style:style>
    <style:style style:name="gr9" style:family="graphic" style:parent-style-name="standard">
      <style:graphic-properties draw:fill="solid" draw:fill-color="#b7b3ca" draw:textarea-vertical-align="top" draw:auto-grow-height="false" fo:min-height="3.14cm" fo:min-width="3.328cm" loext:decorative="false"/>
      <style:paragraph-properties style:writing-mode="lr-tb"/>
    </style:style>
    <style:style style:name="gr10" style:family="graphic" style:parent-style-name="standard">
      <style:graphic-properties draw:textarea-vertical-align="middle" draw:auto-grow-height="false" fo:min-height="0.47cm" fo:min-width="1.687cm" loext:decorative="false"/>
      <style:paragraph-properties style:writing-mode="lr-tb"/>
    </style:style>
    <style:style style:name="gr11" style:family="graphic" style:parent-style-name="standard">
      <style:graphic-properties draw:textarea-vertical-align="middle" draw:auto-grow-height="false" fo:min-height="0.47cm" fo:min-width="1.414cm" loext:decorative="false"/>
      <style:paragraph-properties style:writing-mode="lr-tb"/>
    </style:style>
    <style:style style:name="gr12" style:family="graphic" style:parent-style-name="standard">
      <style:graphic-properties draw:fill="solid" draw:fill-color="#b7b3ca" draw:textarea-vertical-align="top" draw:auto-grow-height="false" fo:min-height="5.569cm" fo:min-width="3.601cm" loext:decorative="false"/>
      <style:paragraph-properties style:writing-mode="lr-tb"/>
    </style:style>
    <style:style style:name="gr13" style:family="graphic" style:parent-style-name="standard">
      <style:graphic-properties draw:textarea-vertical-align="middle" draw:auto-grow-height="false" fo:min-height="0.81cm" fo:min-width="2.234cm" loext:decorative="false"/>
      <style:paragraph-properties style:writing-mode="lr-tb"/>
    </style:style>
    <style:style style:name="gr14" style:family="graphic" style:parent-style-name="standard">
      <style:graphic-properties draw:textarea-vertical-align="middle" draw:auto-grow-height="false" fo:min-height="0.598cm" fo:min-width="1.961cm" loext:decorative="false"/>
      <style:paragraph-properties style:writing-mode="lr-tb"/>
    </style:style>
    <style:style style:name="gr15" style:family="graphic" style:parent-style-name="standard">
      <style:graphic-properties draw:textarea-vertical-align="middle" draw:auto-grow-height="false" fo:min-height="0.598cm" fo:min-width="2.234cm" loext:decorative="false"/>
      <style:paragraph-properties style:writing-mode="lr-tb"/>
    </style:style>
    <style:style style:name="gr16" style:family="graphic" style:parent-style-name="standard">
      <style:graphic-properties draw:fill="solid" draw:fill-color="#b7b3ca" draw:textarea-vertical-align="top" draw:auto-grow-height="false" fo:min-height="6.74cm" fo:min-width="3.875cm" loext:decorative="false"/>
      <style:paragraph-properties style:writing-mode="lr-tb"/>
    </style:style>
    <style:style style:name="gr17" style:family="graphic" style:parent-style-name="standard">
      <style:graphic-properties draw:textarea-vertical-align="middle" draw:auto-grow-height="false" fo:min-height="0.809cm" fo:min-width="2.174cm" loext:decorative="false"/>
      <style:paragraph-properties style:writing-mode="lr-tb"/>
    </style:style>
    <style:style style:name="gr18" style:family="graphic" style:parent-style-name="standard">
      <style:graphic-properties draw:textarea-vertical-align="middle" draw:auto-grow-height="false" fo:min-height="0.809cm" fo:min-width="2.417cm" loext:decorative="false"/>
      <style:paragraph-properties style:writing-mode="lr-tb"/>
    </style:style>
    <style:style style:name="gr19" style:family="graphic" style:parent-style-name="standard">
      <style:graphic-properties draw:textarea-vertical-align="middle" draw:auto-grow-height="false" fo:min-height="0.81cm" fo:min-width="2.417cm" loext:decorative="false"/>
      <style:paragraph-properties style:writing-mode="lr-tb"/>
    </style:style>
    <style:style style:name="gr20" style:family="graphic" style:parent-style-name="standard">
      <style:graphic-properties draw:fill="solid" draw:fill-color="#b7b3ca" draw:textarea-vertical-align="middle" draw:auto-grow-height="false" fo:min-height="1.022cm" fo:min-width="2.781cm" loext:decorative="false"/>
      <style:paragraph-properties style:writing-mode="lr-tb"/>
    </style:style>
    <style:style style:name="gr21" style:family="graphic" style:parent-style-name="standard">
      <style:graphic-properties draw:fill="solid" draw:fill-color="#b7b3ca" draw:textarea-vertical-align="top" draw:auto-grow-height="false" fo:min-height="2.093cm" fo:min-width="3.329cm" loext:decorative="false"/>
      <style:paragraph-properties style:writing-mode="lr-tb"/>
    </style:style>
    <style:style style:name="gr22" style:family="graphic" style:parent-style-name="standard">
      <style:graphic-properties draw:fill="solid" draw:fill-color="#fff5ce" draw:textarea-vertical-align="middle" draw:auto-grow-height="false" fo:min-height="0.592cm" fo:min-width="2.579cm" loext:decorative="false"/>
      <style:paragraph-properties style:writing-mode="lr-tb"/>
    </style:style>
    <style:style style:name="gr23" style:family="graphic" style:parent-style-name="standard">
      <style:graphic-properties draw:fill="solid" draw:fill-color="#ffd7d7" draw:textarea-vertical-align="middle" draw:auto-grow-height="false" fo:min-height="2.926cm" fo:min-width="3.05cm" loext:decorative="false"/>
      <style:paragraph-properties style:writing-mode="lr-tb"/>
    </style:style>
    <style:style style:name="gr24" style:family="graphic" style:parent-style-name="standard">
      <style:graphic-properties draw:fill="solid" draw:fill-color="#ffffff" draw:textarea-vertical-align="middle" draw:auto-grow-height="false" fo:min-height="1.546cm" fo:min-width="1.296cm" loext:decorative="false"/>
      <style:paragraph-properties style:writing-mode="lr-tb"/>
    </style:style>
    <style:style style:name="gr25" style:family="graphic" style:parent-style-name="standard">
      <style:graphic-properties draw:textarea-vertical-align="middle" draw:auto-grow-height="false" fo:min-height="0.25cm" fo:min-width="1.167cm" loext:decorative="false"/>
    </style:style>
    <style:style style:name="gr26" style:family="graphic" style:parent-style-name="standard">
      <style:graphic-properties draw:textarea-vertical-align="middle" draw:auto-grow-height="false" fo:min-height="0.25cm" fo:min-width="1.79cm" loext:decorative="false"/>
    </style:style>
    <style:style style:name="gr27" style:family="graphic" style:parent-style-name="standard">
      <style:graphic-properties svg:stroke-width="0.106cm" svg:stroke-color="#ff3838" draw:marker-start-width="0.359cm" draw:marker-end-width="0.359cm" draw:textarea-vertical-align="middle" fo:padding-top="0.178cm" fo:padding-bottom="0.178cm" fo:padding-left="0.303cm" fo:padding-right="0.303cm" loext:decorative="false"/>
    </style:style>
    <style:style style:name="gr28" style:family="graphic" style:parent-style-name="standard">
      <style:graphic-properties svg:stroke-width="0.106cm" svg:stroke-color="#ff3838" draw:marker-start-width="0.358cm" draw:marker-end-width="0.358cm" draw:textarea-vertical-align="middle" fo:padding-top="0.177cm" fo:padding-bottom="0.177cm" fo:padding-left="0.302cm" fo:padding-right="0.302cm" loext:decorative="false"/>
    </style:style>
    <style:style style:name="gr29" style:family="graphic" style:parent-style-name="standard">
      <style:graphic-properties svg:stroke-width="0.106cm" svg:stroke-color="#ff3838" draw:marker-start="Arrowheads_20_3" draw:marker-start-width="0.359cm" draw:marker-end-width="0.359cm" draw:textarea-vertical-align="middle" fo:padding-top="0.178cm" fo:padding-bottom="0.178cm" fo:padding-left="0.303cm" fo:padding-right="0.303cm" loext:decorative="false"/>
    </style:style>
    <style:style style:name="gr30" style:family="graphic" style:parent-style-name="standard">
      <style:graphic-properties svg:stroke-width="0.106cm" svg:stroke-color="#ff3838" draw:marker-start="" draw:marker-start-width="0.359cm" draw:marker-end="Arrowheads_20_3" draw:marker-end-width="0.359cm" draw:textarea-vertical-align="middle" fo:padding-top="0.178cm" fo:padding-bottom="0.178cm" fo:padding-left="0.303cm" fo:padding-right="0.303cm" loext:decorative="false"/>
    </style:style>
    <style:style style:name="gr31" style:family="graphic" style:parent-style-name="standard">
      <style:graphic-properties svg:stroke-width="0.106cm" svg:stroke-color="#f10d0c" draw:marker-start-width="0.359cm" draw:marker-end-width="0.359cm" draw:textarea-vertical-align="middle" fo:padding-top="0.178cm" fo:padding-bottom="0.178cm" fo:padding-left="0.303cm" fo:padding-right="0.303cm" loext:decorative="false"/>
    </style:style>
    <style:style style:name="gr32" style:family="graphic" style:parent-style-name="standard">
      <style:graphic-properties draw:stroke="dash" draw:stroke-dash="Long_20_Dash" svg:stroke-width="0.106cm" svg:stroke-color="#ff972f" draw:marker-start-width="0.359cm" draw:marker-end-width="0.359cm" svg:stroke-linecap="butt" draw:textarea-vertical-align="middle" fo:padding-top="0.178cm" fo:padding-bottom="0.178cm" fo:padding-left="0.303cm" fo:padding-right="0.303cm" loext:decorative="false"/>
    </style:style>
    <style:style style:name="gr33" style:family="graphic" style:parent-style-name="standard">
      <style:graphic-properties svg:stroke-width="0.106cm" svg:stroke-color="#50938a" draw:marker-start="" draw:marker-start-width="0.359cm" draw:marker-end="Arrowheads_20_3" draw:marker-end-width="0.359cm" draw:textarea-vertical-align="middle" fo:padding-top="0.178cm" fo:padding-bottom="0.178cm" fo:padding-left="0.303cm" fo:padding-right="0.303cm" loext:decorative="false"/>
    </style:style>
    <style:style style:name="gr34" style:family="graphic" style:parent-style-name="standard">
      <style:graphic-properties draw:stroke="dash" draw:stroke-dash="Long_20_Dash_20__28_Rounded_29_" svg:stroke-width="0.106cm" svg:stroke-color="#ff860d" draw:marker-start-width="0.359cm" draw:marker-end-width="0.359cm" svg:stroke-linecap="round" draw:textarea-vertical-align="middle" fo:padding-top="0.178cm" fo:padding-bottom="0.178cm" fo:padding-left="0.303cm" fo:padding-right="0.303cm" loext:decorative="false"/>
    </style:style>
    <style:style style:name="gr35" style:family="graphic" style:parent-style-name="standard">
      <style:graphic-properties draw:stroke="dash" draw:stroke-dash="Long_20_Dash" svg:stroke-width="0.106cm" svg:stroke-color="#ff860d" draw:marker-start-width="0.359cm" draw:marker-end-width="0.359cm" svg:stroke-linecap="butt" draw:textarea-vertical-align="middle" fo:padding-top="0.178cm" fo:padding-bottom="0.178cm" fo:padding-left="0.303cm" fo:padding-right="0.303cm" loext:decorative="false"/>
    </style:style>
    <style:style style:name="gr36" style:family="graphic" style:parent-style-name="standard">
      <style:graphic-properties draw:stroke="dash" draw:stroke-dash="Long_20_Dash" svg:stroke-width="0.106cm" svg:stroke-color="#ff860d" draw:marker-start-width="0.359cm" draw:marker-end="Arrowheads_20_3" draw:marker-end-width="0.359cm" svg:stroke-linecap="butt" draw:textarea-vertical-align="middle" fo:padding-top="0.178cm" fo:padding-bottom="0.178cm" fo:padding-left="0.303cm" fo:padding-right="0.303cm" loext:decorative="false"/>
    </style:style>
    <style:style style:name="gr37" style:family="graphic" style:parent-style-name="standard">
      <style:graphic-properties svg:stroke-width="0.106cm" svg:stroke-color="#50938a" draw:marker-start-width="0.359cm" draw:marker-end-width="0.359cm" draw:textarea-vertical-align="middle" fo:padding-top="0.178cm" fo:padding-bottom="0.178cm" fo:padding-left="0.303cm" fo:padding-right="0.303cm" loext:decorative="false"/>
    </style:style>
    <style:style style:name="gr38" style:family="graphic" style:parent-style-name="standard">
      <style:graphic-properties svg:stroke-width="0.106cm" svg:stroke-color="#50938a" draw:marker-start-width="0.359cm" draw:marker-end="Arrowheads_20_3" draw:marker-end-width="0.359cm" draw:textarea-vertical-align="middle" fo:padding-top="0.178cm" fo:padding-bottom="0.178cm" fo:padding-left="0.303cm" fo:padding-right="0.303cm" loext:decorative="false"/>
    </style:style>
    <style:style style:name="gr39" style:family="graphic" style:parent-style-name="standard">
      <style:graphic-properties svg:stroke-width="0.106cm" svg:stroke-color="#50938a" draw:marker-start="Arrowheads_20_3" draw:marker-start-width="0.359cm" draw:marker-end="" draw:marker-end-width="0.359cm" draw:textarea-vertical-align="middle" fo:padding-top="0.178cm" fo:padding-bottom="0.178cm" fo:padding-left="0.303cm" fo:padding-right="0.303cm" loext:decorative="false"/>
    </style:style>
    <style:style style:name="gr40" style:family="graphic" style:parent-style-name="standard">
      <style:graphic-properties svg:stroke-width="0.106cm" svg:stroke-color="#50938a" draw:marker-start="Arrowheads_20_3" draw:marker-start-width="0.359cm" draw:marker-end-width="0.359cm" draw:textarea-vertical-align="middle" fo:padding-top="0.178cm" fo:padding-bottom="0.178cm" fo:padding-left="0.303cm" fo:padding-right="0.303cm" loext:decorative="false"/>
    </style:style>
    <style:style style:name="gr41" style:family="graphic" style:parent-style-name="standard">
      <style:graphic-properties draw:stroke="dash" draw:stroke-dash="Long_20_Dash" svg:stroke-width="0.106cm" svg:stroke-color="#ea7500" draw:marker-start-width="0.359cm" draw:marker-end-width="0.359cm" svg:stroke-linecap="butt" draw:textarea-vertical-align="middle" fo:padding-top="0.178cm" fo:padding-bottom="0.178cm" fo:padding-left="0.303cm" fo:padding-right="0.303cm" loext:decorative="false"/>
    </style:style>
    <style:style style:name="gr42" style:family="graphic" style:parent-style-name="standard">
      <style:graphic-properties draw:textarea-vertical-align="middle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4" style:family="graphic" style:parent-style-name="standard">
      <style:graphic-properties svg:stroke-width="0.106cm" svg:stroke-color="#3faf46" draw:marker-start-width="0.359cm" draw:marker-end-width="0.359cm" draw:textarea-vertical-align="middle" fo:padding-top="0.178cm" fo:padding-bottom="0.178cm" fo:padding-left="0.303cm" fo:padding-right="0.303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5ce"/>
      <style:paragraph-properties fo:text-align="center"/>
    </style:style>
    <style:style style:name="P3" style:family="paragraph">
      <loext:graphic-properties draw:fill="solid" draw:fill-color="#dedce6"/>
      <style:paragraph-properties fo:text-align="center"/>
    </style:style>
    <style:style style:name="P4" style:family="paragraph">
      <loext:graphic-properties draw:fill="solid" draw:fill-color="#b7b3ca"/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/>
    </style:style>
    <style:style style:name="P7" style:family="paragraph">
      <loext:graphic-properties draw:fill="solid" draw:fill-color="#ffd7d7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493cm" svg:height="2.574cm" svg:x="23.238cm" svg:y="2.587cm">
          <text:p text:style-name="P1">View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1" xml:id="id3" draw:id="id3" draw:layer="layout" svg:width="4.445cm" svg:height="2.54cm" svg:x="23.265cm" svg:y="6.744cm">
          <text:p text:style-name="P1">Rout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2" xml:id="id8" draw:id="id8" draw:layer="layout" svg:width="3.493cm" svg:height="2.857cm" svg:x="16.223cm" svg:y="18.333cm">
          <text:p text:style-name="P1">app.j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position-x="$0" draw:handle-position-y="bottom" draw:handle-range-x-minimum="10800" draw:handle-range-x-maximum="21600"/>
          </draw:enhanced-geometry>
        </draw:custom-shape>
        <draw:custom-shape draw:style-name="gr4" draw:text-style-name="P3" draw:layer="measurelines" svg:width="6.349cm" svg:height="12.7cm" svg:x="15.288cm" svg:y="1.635cm">
          <text:p text:style-name="P1">private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1" xml:id="id7" draw:id="id7" draw:layer="measurelines" svg:width="3.492cm" svg:height="2.54cm" svg:x="15.605cm" svg:y="10.208cm">
          <text:p text:style-name="P1">APIKey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1" draw:layer="measurelines" svg:width="4.763cm" svg:height="4.445cm" svg:x="15.604cm" svg:y="5.128cm">
          <text:p text:style-name="P1">Config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2" xml:id="id5" draw:id="id5" draw:layer="measurelines" svg:width="3.493cm" svg:height="1.27cm" svg:x="15.754cm" svg:y="7.165cm">
          <text:p text:style-name="P1">config.x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position-x="$0" draw:handle-position-y="bottom" draw:handle-range-x-minimum="10800" draw:handle-range-x-maximum="21600"/>
          </draw:enhanced-geometry>
        </draw:custom-shape>
        <draw:custom-shape draw:style-name="gr8" draw:text-style-name="P3" draw:layer="layout" svg:width="13.335cm" svg:height="23.813cm" svg:x="32.432cm" svg:y="6.079cm">
          <text:p text:style-name="P1">public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4" draw:layer="layout" svg:width="4.445cm" svg:height="5.08cm" draw:transform="skewX (0.00174532925199433) translate (38.245cm 20.861cm)">
          <text:p text:style-name="P1">javascrip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5" xml:id="id12" draw:id="id12" draw:layer="layout" svg:width="2.539cm" svg:height="1.079cm" svg:x="38.563cm" svg:y="22.766cm">
          <text:p text:style-name="P5"><text:span text:style-name="T1">Server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1" draw:text-style-name="P6" xml:id="id16" draw:id="id16" draw:layer="layout" svg:width="2.222cm" svg:height="1.079cm" svg:x="38.562cm" svg:y="24.227cm">
          <text:p text:style-name="P6">Client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2" draw:text-style-name="P4" draw:layer="measurelines" svg:width="4.762cm" svg:height="8.722cm" svg:x="38.562cm" svg:y="11.652cm">
          <text:p text:style-name="P1">data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3" draw:text-style-name="P1" xml:id="id17" draw:id="id17" draw:layer="measurelines" svg:width="3.175cm" svg:height="1.588cm" svg:x="38.958cm" svg:y="14.342cm">
          <text:p text:style-name="P1">recipes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4" draw:text-style-name="P1" xml:id="id30" draw:id="id30" draw:layer="measurelines" svg:width="2.857cm" svg:height="1.27cm" svg:x="38.933cm" svg:y="17.818cm">
          <text:p text:style-name="P1">pdfs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5" draw:text-style-name="P1" xml:id="id29" draw:id="id29" draw:layer="measurelines" svg:width="3.175cm" svg:height="1.27cm" svg:x="38.87cm" svg:y="16.159cm">
          <text:p text:style-name="P1">statics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6" draw:text-style-name="P4" draw:layer="measurelines" svg:width="5.08cm" svg:height="10.477cm" svg:x="32.847cm" svg:y="11.653cm">
          <text:p text:style-name="P1">images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7" draw:text-style-name="P1" xml:id="id11" draw:id="id11" draw:layer="measurelines" svg:width="3.105cm" svg:height="1.587cm" svg:x="33.293cm" svg:y="14.828cm">
          <text:p text:style-name="P1">buttons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8" draw:text-style-name="P1" xml:id="id26" draw:id="id26" draw:layer="measurelines" svg:width="3.387cm" svg:height="1.587cm" svg:x="33.165cm" svg:y="16.733cm">
          <text:p text:style-name="P1">recipes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9" draw:text-style-name="P1" xml:id="id28" draw:id="id28" draw:layer="measurelines" svg:width="3.387cm" svg:height="1.588cm" svg:x="33.165cm" svg:y="18.638cm">
          <text:p text:style-name="P1">staging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0" draw:text-style-name="P4" xml:id="id32" draw:id="id32" draw:layer="measurelines" svg:width="3.81cm" svg:height="1.905cm" svg:x="34.434cm" svg:y="26.451cm">
          <text:p text:style-name="P1">html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1" draw:text-style-name="P4" draw:layer="layout" svg:width="4.446cm" svg:height="3.512cm" svg:x="32.847cm" svg:y="22.766cm">
          <text:p text:style-name="P1"><text:span text:style-name="T2">stylesheets</text:span>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2" draw:text-style-name="P2" xml:id="id31" draw:id="id31" draw:layer="measurelines" svg:width="3.078cm" svg:height="0.953cm" svg:x="33.143cm" svg:y="24.442cm">
          <text:p text:style-name="P1"><text:span text:style-name="T1">style</text:span>.<text:span text:style-name="T1">css</text:span>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position-x="$0" draw:handle-position-y="bottom" draw:handle-range-x-minimum="10800" draw:handle-range-x-maximum="21600"/>
          </draw:enhanced-geometry>
        </draw:custom-shape>
        <draw:custom-shape draw:style-name="gr23" draw:text-style-name="P7" draw:layer="measurelines" svg:width="5.398cm" svg:height="3.175cm" svg:x="7.985cm" svg:y="18.145cm">
          <text:p text:style-name="P1">Browser</text:p>
          <draw:enhanced-geometry svg:viewBox="0 0 21600 21600" draw:glue-points="10800 0 0 10800 10800 21600 21600 10800" draw:text-areas="3600 0 17800 21600" draw:mirror-horizontal="true" draw:type="flowchart-display" draw:enhanced-path="M 3600 0 L 17800 0 X 21600 10800 17800 21600 L 3600 21600 0 10800 Z N"/>
        </draw:custom-shape>
        <draw:custom-shape draw:style-name="gr24" draw:text-style-name="P8" draw:layer="measurelines" svg:width="2.54cm" svg:height="2.54cm" svg:x="2.27cm" svg:y="18.462cm">
          <text:p text:style-name="P1"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position-x="10800" draw:handle-position-y="$0" draw:handle-range-y-minimum="14510" draw:handle-range-y-maximum="18520"/>
          </draw:enhanced-geometry>
        </draw:custom-shape>
        <draw:custom-shape draw:style-name="gr25" draw:text-style-name="P1" draw:layer="measurelines" svg:width="1.905cm" svg:height="0.999cm" svg:x="5.445cm" svg:y="19.2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" draw:layer="measurelines" svg:width="2.858cm" svg:height="0.999cm" svg:x="13.382cm" svg:y="19.11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draw:connector draw:style-name="gr27" draw:text-style-name="P1" xml:id="id2" draw:id="id2" draw:layer="measurelines" draw:type="line" svg:x1="22.467cm" svg:y1="16.656cm" svg:x2="22.467cm" svg:y2="3.904cm" svg:d="M22467 16656v-12752" svg:viewBox="0 0 1 12753">
          <text:p/>
        </draw:connector>
        <draw:connector draw:style-name="gr27" draw:text-style-name="P1" draw:layer="measurelines" draw:type="line" svg:x1="23.238cm" svg:y1="3.874cm" svg:x2="22.467cm" svg:y2="3.904cm" draw:start-shape="id1" draw:start-glue-point="5" draw:end-shape="id2" draw:end-glue-point="3" svg:d="M23238 3874l-771 30" svg:viewBox="0 0 772 31">
          <text:p/>
        </draw:connector>
        <draw:connector draw:style-name="gr27" draw:text-style-name="P1" draw:layer="measurelines" draw:type="line" svg:x1="22.512cm" svg:y1="8.003cm" svg:x2="23.265cm" svg:y2="8.014cm" draw:end-shape="id3" draw:end-glue-point="5" svg:d="M22512 8003l753 11" svg:viewBox="0 0 754 12">
          <text:p/>
        </draw:connector>
        <draw:connector draw:style-name="gr27" draw:text-style-name="P1" xml:id="id4" draw:id="id4" draw:layer="measurelines" draw:type="line" svg:x1="22.467cm" svg:y1="16.656cm" svg:x2="14.443cm" svg:y2="16.656cm" draw:start-shape="id2" draw:start-glue-point="2" svg:d="M22467 16656h-8024" svg:viewBox="0 0 8025 1">
          <text:p/>
        </draw:connector>
        <draw:connector draw:style-name="gr27" draw:text-style-name="P1" xml:id="id6" draw:id="id6" draw:layer="measurelines" draw:type="line" svg:x1="14.443cm" svg:y1="16.656cm" svg:x2="14.443cm" svg:y2="7.851cm" draw:start-shape="id4" draw:start-glue-point="3" svg:d="M14443 16656v-8805" svg:viewBox="0 0 1 8806">
          <text:p/>
        </draw:connector>
        <draw:connector draw:style-name="gr28" draw:text-style-name="P1" draw:layer="measurelines" draw:type="line" svg:x1="15.754cm" svg:y1="7.8cm" svg:x2="14.443cm" svg:y2="7.851cm" draw:start-shape="id5" draw:start-glue-point="5" draw:end-shape="id6" draw:end-glue-point="3" svg:d="M15754 7800l-1311 51" svg:viewBox="0 0 1312 52">
          <text:p/>
        </draw:connector>
        <draw:connector draw:style-name="gr27" draw:text-style-name="P1" draw:layer="measurelines" draw:type="line" svg:x1="15.605cm" svg:y1="11.478cm" svg:x2="14.464cm" svg:y2="11.465cm" draw:start-shape="id7" draw:start-glue-point="5" svg:d="M15605 11478l-1141-13" svg:viewBox="0 0 1142 14">
          <text:p/>
        </draw:connector>
        <draw:connector draw:style-name="gr29" draw:text-style-name="P1" draw:layer="measurelines" draw:type="line" svg:x1="17.97cm" svg:y1="18.333cm" svg:x2="17.97cm" svg:y2="16.691cm" draw:start-shape="id8" draw:start-glue-point="4" svg:d="M17970 18333v-1642" svg:viewBox="0 0 1 1643">
          <text:p/>
        </draw:connector>
        <draw:connector draw:style-name="gr30" draw:text-style-name="P1" xml:id="id9" draw:id="id9" draw:layer="measurelines" draw:type="line" svg:x1="26.987cm" svg:y1="19.791cm" svg:x2="19.716cm" svg:y2="19.761cm" draw:end-shape="id8" draw:end-glue-point="7" svg:d="M26987 19791l-7271-30" svg:viewBox="0 0 7272 31">
          <text:p/>
        </draw:connector>
        <draw:connector draw:style-name="gr27" draw:text-style-name="P1" xml:id="id10" draw:id="id10" draw:layer="measurelines" draw:type="line" svg:x1="26.987cm" svg:y1="19.791cm" svg:x2="27.023cm" svg:y2="15.699cm" draw:start-shape="id9" draw:start-glue-point="2" svg:d="M26987 19791l36-4092" svg:viewBox="0 0 37 4093">
          <text:p/>
        </draw:connector>
        <draw:connector draw:style-name="gr31" draw:text-style-name="P1" draw:layer="measurelines" draw:type="line" svg:x1="27.023cm" svg:y1="15.699cm" svg:x2="33.293cm" svg:y2="15.622cm" draw:start-shape="id10" draw:start-glue-point="3" draw:end-shape="id11" draw:end-glue-point="5" svg:d="M27023 15699l6270-77" svg:viewBox="0 0 6271 78">
          <text:p/>
        </draw:connector>
        <draw:connector draw:style-name="gr27" draw:text-style-name="P1" draw:layer="measurelines" draw:type="line" svg:x1="27.023cm" svg:y1="24.871cm" svg:x2="26.987cm" svg:y2="19.791cm" draw:end-shape="id9" draw:end-glue-point="2" svg:d="M27023 24871l-36-5080" svg:viewBox="0 0 37 5081">
          <text:p/>
        </draw:connector>
        <draw:connector draw:style-name="gr27" draw:text-style-name="P1" xml:id="id13" draw:id="id13" draw:layer="measurelines" draw:type="line" svg:x1="45.489cm" svg:y1="23.321cm" svg:x2="41.102cm" svg:y2="23.306cm" draw:end-shape="id12" draw:end-glue-point="7" svg:d="M45489 23321l-4387-15" svg:viewBox="0 0 4388 16">
          <text:p/>
        </draw:connector>
        <draw:connector draw:style-name="gr27" draw:text-style-name="P1" xml:id="id14" draw:id="id14" draw:layer="measurelines" draw:type="line" svg:x1="45.438cm" svg:y1="30.869cm" svg:x2="45.489cm" svg:y2="23.321cm" draw:end-shape="id13" draw:end-glue-point="2" svg:d="M45438 30869l51-7548" svg:viewBox="0 0 52 7549">
          <text:p/>
        </draw:connector>
        <draw:connector draw:style-name="gr27" draw:text-style-name="P1" xml:id="id15" draw:id="id15" draw:layer="measurelines" draw:type="line" svg:x1="45.438cm" svg:y1="30.869cm" svg:x2="27.023cm" svg:y2="30.869cm" draw:start-shape="id14" draw:start-glue-point="2" svg:d="M45438 30869h-18415" svg:viewBox="0 0 18416 1">
          <text:p/>
        </draw:connector>
        <draw:connector draw:style-name="gr27" draw:text-style-name="P1" draw:layer="measurelines" draw:type="line" svg:x1="27.023cm" svg:y1="30.869cm" svg:x2="27.023cm" svg:y2="24.871cm" draw:start-shape="id15" draw:start-glue-point="3" svg:d="M27023 30869v-5998" svg:viewBox="0 0 1 5999">
          <text:p/>
        </draw:connector>
        <draw:connector draw:style-name="gr32" draw:text-style-name="P1" xml:id="id18" draw:id="id18" draw:layer="measurelines" draw:type="line" svg:x1="46.284cm" svg:y1="24.801cm" svg:x2="40.784cm" svg:y2="24.767cm" draw:end-shape="id16" draw:end-glue-point="7" svg:d="M46284 24801l-5500-34" svg:viewBox="0 0 5501 35">
          <text:p/>
        </draw:connector>
        <draw:connector draw:style-name="gr33" draw:text-style-name="P1" xml:id="id23" draw:id="id23" draw:layer="measurelines" draw:type="line" svg:x1="47.88cm" svg:y1="15.166cm" svg:x2="42.133cm" svg:y2="15.136cm" draw:end-shape="id17" draw:end-glue-point="7" svg:d="M47880 15166l-5747-30" svg:viewBox="0 0 5748 31">
          <text:p/>
        </draw:connector>
        <draw:connector draw:style-name="gr32" draw:text-style-name="P1" xml:id="id19" draw:id="id19" draw:layer="measurelines" draw:type="line" svg:x1="46.319cm" svg:y1="31.751cm" svg:x2="46.284cm" svg:y2="24.801cm" draw:end-shape="id18" draw:end-glue-point="2" svg:d="M46319 31751l-35-6950" svg:viewBox="0 0 36 6951">
          <text:p/>
        </draw:connector>
        <draw:connector draw:style-name="gr34" draw:text-style-name="P1" xml:id="id20" draw:id="id20" draw:layer="measurelines" draw:type="line" svg:x1="46.319cm" svg:y1="31.751cm" svg:x2="26.176cm" svg:y2="31.786cm" draw:start-shape="id19" draw:start-glue-point="2" svg:d="M46319 31751l-20143 35" svg:viewBox="0 0 20144 36">
          <text:p/>
        </draw:connector>
        <draw:connector draw:style-name="gr35" draw:text-style-name="P1" xml:id="id21" draw:id="id21" draw:layer="measurelines" draw:type="line" svg:x1="26.176cm" svg:y1="31.786cm" svg:x2="26.176cm" svg:y2="20.814cm" draw:start-shape="id20" draw:start-glue-point="3" svg:d="M26176 31786v-10972" svg:viewBox="0 0 1 10973">
          <text:p/>
        </draw:connector>
        <draw:connector draw:style-name="gr35" draw:text-style-name="P1" xml:id="id22" draw:id="id22" draw:layer="measurelines" draw:type="line" svg:x1="26.176cm" svg:y1="20.814cm" svg:x2="21.308cm" svg:y2="20.885cm" draw:start-shape="id21" draw:start-glue-point="3" svg:d="M26176 20814l-4868 71" svg:viewBox="0 0 4869 72">
          <text:p/>
        </draw:connector>
        <draw:connector draw:style-name="gr36" draw:text-style-name="P1" draw:layer="measurelines" draw:type="line" svg:x1="21.308cm" svg:y1="20.885cm" svg:x2="19.716cm" svg:y2="19.761cm" draw:start-shape="id22" draw:start-glue-point="3" draw:end-shape="id8" draw:end-glue-point="7" svg:d="M21308 20885l-1592-1124" svg:viewBox="0 0 1593 1125">
          <text:p/>
        </draw:connector>
        <draw:connector draw:style-name="gr37" draw:text-style-name="P1" xml:id="id24" draw:id="id24" draw:layer="measurelines" draw:type="line" svg:x1="47.907cm" svg:y1="32.809cm" svg:x2="47.88cm" svg:y2="15.166cm" draw:end-shape="id23" draw:end-glue-point="2" svg:d="M47907 32809l-27-17643" svg:viewBox="0 0 28 17644">
          <text:p/>
        </draw:connector>
        <draw:connector draw:style-name="gr37" draw:text-style-name="P1" xml:id="id25" draw:id="id25" draw:layer="measurelines" draw:type="line" svg:x1="47.907cm" svg:y1="32.809cm" svg:x2="17.921cm" svg:y2="32.809cm" draw:start-shape="id24" draw:start-glue-point="2" svg:d="M47907 32809h-29986" svg:viewBox="0 0 29987 1">
          <text:p/>
        </draw:connector>
        <draw:connector draw:style-name="gr38" draw:text-style-name="P1" draw:layer="measurelines" draw:type="line" svg:x1="17.921cm" svg:y1="32.809cm" svg:x2="17.97cm" svg:y2="21.19cm" draw:start-shape="id25" draw:start-glue-point="3" draw:end-shape="id8" draw:end-glue-point="6" svg:d="M17921 32809l49-11619" svg:viewBox="0 0 50 11620">
          <text:p/>
        </draw:connector>
        <draw:connector draw:style-name="gr39" draw:text-style-name="P1" xml:id="id27" draw:id="id27" draw:layer="measurelines" draw:type="line" svg:x1="33.165cm" svg:y1="17.527cm" svg:x2="30.209cm" svg:y2="17.538cm" draw:start-shape="id26" draw:start-glue-point="5" svg:d="M33165 17527l-2956 11" svg:viewBox="0 0 2957 12">
          <text:p/>
        </draw:connector>
        <draw:connector draw:style-name="gr37" draw:text-style-name="P1" draw:layer="measurelines" draw:type="line" svg:x1="30.273cm" svg:y1="32.809cm" svg:x2="30.209cm" svg:y2="17.538cm" draw:end-shape="id27" draw:end-glue-point="3" svg:d="M30273 32809l-64-15271" svg:viewBox="0 0 65 15272">
          <text:p/>
        </draw:connector>
        <draw:connector draw:style-name="gr40" draw:text-style-name="P1" draw:layer="measurelines" draw:type="line" svg:x1="33.165cm" svg:y1="19.432cm" svg:x2="30.198cm" svg:y2="19.474cm" draw:start-shape="id28" draw:start-glue-point="5" svg:d="M33165 19432l-2967 42" svg:viewBox="0 0 2968 43">
          <text:p/>
        </draw:connector>
        <draw:connector draw:style-name="gr33" draw:text-style-name="P1" draw:layer="measurelines" draw:type="line" svg:x1="47.87cm" svg:y1="16.791cm" svg:x2="42.045cm" svg:y2="16.794cm" draw:end-shape="id29" draw:end-glue-point="7" svg:d="M47870 16791l-5825 3" svg:viewBox="0 0 5826 4">
          <text:p/>
        </draw:connector>
        <draw:connector draw:style-name="gr33" draw:text-style-name="P1" draw:layer="measurelines" draw:type="line" svg:x1="47.872cm" svg:y1="18.486cm" svg:x2="41.79cm" svg:y2="18.453cm" draw:end-shape="id30" draw:end-glue-point="7" svg:d="M47872 18486l-6082-33" svg:viewBox="0 0 6083 34">
          <text:p/>
        </draw:connector>
        <draw:connector draw:style-name="gr41" draw:text-style-name="P1" draw:layer="measurelines" draw:type="line" svg:x1="33.143cm" svg:y1="24.919cm" svg:x2="26.314cm" svg:y2="24.967cm" draw:start-shape="id31" draw:start-glue-point="5" svg:d="M33143 24919l-6829 48" svg:viewBox="0 0 6830 49">
          <text:p/>
        </draw:connector>
        <draw:connector draw:style-name="gr35" draw:text-style-name="P1" draw:layer="measurelines" draw:type="line" svg:x1="34.434cm" svg:y1="27.404cm" svg:x2="26.121cm" svg:y2="27.469cm" draw:start-shape="id32" draw:start-glue-point="5" svg:d="M34434 27404l-8313 65" svg:viewBox="0 0 8314 66">
          <text:p/>
        </draw:connector>
        <draw:connector draw:style-name="gr42" draw:text-style-name="P1" draw:layer="measurelines" draw:type="line" svg:x1="8.937cm" svg:y1="23.86cm" svg:x2="8.937cm" svg:y2="23.86cm" svg:d="M8937 23860z" svg:viewBox="0 0 1 1">
          <text:p/>
        </draw:connector>
        <draw:connector draw:style-name="gr27" draw:text-style-name="P1" draw:layer="measurelines" draw:type="line" svg:x1="8.069cm" svg:y1="25.056cm" svg:x2="2.982cm" svg:y2="25.063cm" svg:d="M8069 25056l-5087 7" svg:viewBox="0 0 5088 8">
          <text:p/>
        </draw:connector>
        <draw:frame draw:style-name="gr43" draw:text-style-name="P10" draw:layer="measurelines" svg:width="5.073cm" svg:height="0.806cm" svg:x="3.064cm" svg:y="25.447cm">
          <draw:text-box>
            <text:p text:style-name="P9"><text:span text:style-name="T1">Read and processed</text:span></text:p>
          </draw:text-box>
        </draw:frame>
        <draw:connector draw:style-name="gr35" draw:text-style-name="P1" draw:layer="measurelines" draw:type="line" svg:x1="8.122cm" svg:y1="26.432cm" svg:x2="2.857cm" svg:y2="26.485cm" svg:d="M8122 26432l-5265 53" svg:viewBox="0 0 5266 54">
          <text:p/>
        </draw:connector>
        <draw:frame draw:style-name="gr43" draw:text-style-name="P10" draw:layer="measurelines" svg:width="5.375cm" svg:height="0.806cm" svg:x="3.037cm" svg:y="26.903cm">
          <draw:text-box>
            <text:p><text:span text:style-name="T1">Read as pass-through</text:span></text:p>
          </draw:text-box>
        </draw:frame>
        <draw:connector draw:style-name="gr44" draw:text-style-name="P1" draw:layer="measurelines" draw:type="line" svg:x1="8.096cm" svg:y1="28.02cm" svg:x2="3.148cm" svg:y2="28.073cm" svg:d="M8096 28020l-4948 53" svg:viewBox="0 0 4949 54">
          <text:p/>
        </draw:connector>
        <draw:frame draw:style-name="gr43" draw:text-style-name="P10" draw:layer="measurelines" svg:width="2.97cm" svg:height="0.806cm" svg:x="3.857cm" svg:y="28.451cm">
          <draw:text-box>
            <text:p><text:span text:style-name="T1">Read/Wri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40" svg:d="M0 40l10-40 10 4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.8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12T14:38:01.230129500</meta:creation-date>
    <dc:date>2026-07-14T08:48:39.752985100</dc:date>
    <meta:editing-duration>PT23H46M45S</meta:editing-duration>
    <meta:editing-cycles>3</meta:editing-cycles>
    <meta:generator>LibreOffice/26.2.4.2$Windows_X86_64 LibreOffice_project/0229ac93fcf0d7cbc6376066c6f35021cef002dc</meta:generator>
    <meta:print-date>2026-07-13T08:54:24.404423000</meta:print-date>
    <meta:printed-by>PDF files</meta:printed-by>
    <meta:document-statistic meta:object-count="66"/>
  </office:meta>
</office:document-meta>
</file>